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verse Causalit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ase study iMARSYS 05</text:p>
            <text:p>Summer semester 2026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agement assumption is that a management measure should influence stock size (spawning stock biomass, “SSB”)</text:p>
              </text:list-item>
              <text:list-item>
                <text:p>Management measure could be catch or fishing mortality</text:p>
              </text:list-item>
              <text:list-item>
                <text:p>Catch = <text:span text:style-name="T1">f</text:span>(stock size, fishing mortalit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ever, in declining stocks it might be that stock dynamics actually affect the dynamics of catch and / or fishing mortality</text:p>
              </text:list-item>
              <text:list-item>
                <text:p>→ management attempting to “course-correct” after (unexpected) stock decline</text:p>
              </text:list-item>
              <text:list-item>
                <text:p>“Runaway effect”: </text:p>
                <text:p>I) management action <text:span text:style-name="T2">→</text:span> system response <text:span text:style-name="T3">--&gt;</text:span> management action</text:p>
              </text:list-item>
            </text:list>
            <text:list text:style-name="L4">
              <text:list-header>
                <text:p text:style-name="P2"><text:span text:style-name="T4">II) </text:span>management action <text:span text:style-name="T3">--&gt;</text:span> system response → management action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o some explorative regression analyses:</text:p>
              </text:list-item>
              <text:list-item>
                <text:p>→ model SSB against catch, or against F, and vice versa</text:p>
              </text:list-item>
              <text:list-item>
                <text:p>→ use different time lags to account to delays of the effect appearing in the stock or in the management metric</text:p>
              </text:list-item>
              <text:list-item>
                <text:p>→ work with subsets of the time series to cover stable and transitionary phas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ork with aggregated data (total catch, Fbar, SSB or total biomass) or with age-specific data (numbers-at-age, catch-at-age, fishing-mortality-at-age)</text:p>
              </text:list-item>
              <text:list-item>
                <text:p>Try to find out if signs of reverse causality (persistent or transient events) occurred in fish stoc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ybe a linear causal relationship between stock size and management metric might be a sign of too slow course correction, and an abrupt relationship a sign of a more decisive course correction?</text:p>
              </text:list-item>
              <text:list-item>
                <text:p>Just an idea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23T12:12:53.581922924</meta:creation-date>
    <dc:date>2026-06-23T12:26:46.486831958</dc:date>
    <meta:editing-duration>PT13M53S</meta:editing-duration>
    <meta:editing-cycles>2</meta:editing-cycles>
    <meta:generator>LibreOffice/6.4.7.2$Linux_X86_64 LibreOffice_project/40$Build-2</meta:generator>
    <meta:document-statistic meta:object-count="45"/>
  </office:meta>
</office:document-meta>
</file>